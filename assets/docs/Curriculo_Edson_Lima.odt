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officeooo:paragraph-rsid="001583bf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583bf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DSON DE LIMA SOUZA</text:span></text:p>
      <text:p text:style-name="P1">Arcoverde – Pernambuco<text:line-break/>(87) 99636-7039 | edsonlimaagil@gmail.com<text:line-break/>LinkedIn: linkedin.com/in/edsonlimadev | GitHub: github.com/EdsonDevLima</text:p>
      <text:p text:style-name="P1"><text:span text:style-name="T2">NODE.JS | TYPESCRIPT | REACT | </text:span><text:span text:style-name="T3">C# |</text:span><text:span text:style-name="T2"> .NET | DOCKER | REDIS | POSTGRESQL </text:span></text:p>
      <text:p text:style-name="P2"><text:span text:style-name="T5">Objetivo</text:span></text:p>
      <text:p text:style-name="P2">Desenvolvedor Full Stack com foco em backend, integrações entre sistemas e automações. Experiência com aplicações em Node.js, TypeScript, React e .NET, atuando em ambientes Linux, deploys, APIs REST, filas, Redis, Docker e bancos relacionais. Utilizo ferramentas de IA no fluxo de desenvolvimento para acelerar tarefas repetitivas, auxiliar na análise de código, geração de testes e otimização de soluções técnicas.</text:p>
      <text:p text:style-name="P2"><text:span text:style-name="T5">Formação Acadêmica</text:span></text:p>
      <text:p text:style-name="P2">• Análise e Desenvolvimento de Sistemas — Unopar (Conclusão em 08/2024)</text:p>
      <text:p text:style-name="P2"><text:span text:style-name="T5">Conhecimentos</text:span></text:p>
      <text:p text:style-name="P2"><text:span text:style-name="T4">Backend:</text:span> Node.js, TypeScript, Fastify, NestJS, C#/.NET, APIs REST, JWT, Redis, Microsserviços<text:line-break/><text:span text:style-name="T4">Frontend:</text:span> React.js, Next.js, Vue.js, Tailwind CSS<text:line-break/><text:span text:style-name="T4">Banco de Dados:</text:span> PostgreSQL, MySQL, SQL Server<text:line-break/><text:span text:style-name="T4">Infraestrutura &amp; DevOps:</text:span> Docker, Linux, Cloudflare, DigitalOcean, Render, GitHub, GitLab<text:line-break/><text:span text:style-name="T4">Arquitetura &amp; Engenharia:</text:span> DDD, Clean Code, Integrações de Sistemas, Automações, Filas e processamento assíncrono, Segurança de aplicações<text:line-break/><text:span text:style-name="T4">Ferramentas de IA: </text:span>ChatGPT, Codex, Claude, Cursor AI</text:p>
      <text:p text:style-name="P2"><text:span text:style-name="T5">Experiência Profissional</text:span></text:p>
      <text:p text:style-name="P2">Agil.net — Desenvolvedor Full Stack (1 ano e 7 meses)<text:line-break/>• Desenvolvimento backend utilizando Node.js, Fastify e TypeScript<text:line-break/>• Desenvolvimento frontend com Vue.js<text:line-break/>• Integrações entre CRMs e plataformas externas<text:line-break/>• Implementação de automações e rotinas de processamento<text:line-break/>• Utilização de Redis para cache e filas<text:line-break/>• Deploys em ambiente Linux e gerenciamento via Cloudflare<text:line-break/>• Aplicação de DDD, Clean Code e boas práticas de segurança<text:line-break/><text:line-break/>CTM – Consultoria Softwares Públicos — Suporte Técnico (3 anos)<text:line-break/>• Atendimento e suporte técnico a usuários<text:line-break/>• Diagnóstico e resolução de problemas em sistemas<text:line-break/>• Apoio em infraestrutura e manutenção de aplicações</text:p>
      <text:p text:style-name="P2"><text:span text:style-name="T5">Projetos</text:span></text:p>
      <text:p text:style-name="P3"><text:span text:style-name="T9">Atlas CRM</text:span> — Sistema de gerenciamento de vendas e relacionamento comercial.<text:line-break/>Tecnologias: React, NestJS, Node.js, TypeScript, MySQL, JWT<text:line-break/><text:span text:style-name="T7">Atlas Vendas </text:span>— Plataforma de vendas online integrada a fornecedores externos.<text:line-break/>Tecnologias: Next.js, TypeScript, Tailwind CSS, APIs externas<text:line-break/><text:span text:style-name="T4">System Saúde</text:span> — Sistema de automação de atendimento hospitalar.<text:line-break/>Tecnologias: C#, .NET, DDD, SQL Server</text:p>
      <text:p text:style-name="P2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041cm" fo:margin-bottom="0.94cm" fo:margin-left="1.981cm" fo:margin-right="1.98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5-08T11:09:15.118659128</dc:date>
    <meta:editing-duration>PT39S</meta:editing-duration>
    <meta:generator>LibreOffice/24.2.7.2$Linux_X86_64 LibreOffice_project/420$Build-2</meta:generator>
    <meta:print-date>2026-05-08T11:08:35.583711607</meta:print-date>
    <meta:printed-by>Arquivos PDF</meta:printed-by>
    <meta:document-statistic meta:table-count="0" meta:image-count="0" meta:object-count="0" meta:page-count="1" meta:paragraph-count="13" meta:word-count="309" meta:character-count="2264" meta:non-whitespace-character-count="1958"/>
    <meta:user-defined meta:name="AppVersion">14.0000</meta:user-defined>
    <meta:template xlink:type="simple" xlink:actuate="onRequest" xlink:title="Normal.dotm" xlink:href=""/>
  </office:meta>
</office:document-meta>
</file>