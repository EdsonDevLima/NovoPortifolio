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line-height="100%"/>
      <style:text-properties officeooo:paragraph-rsid="001583bf"/>
    </style:style>
    <style:style style:name="P4" style:family="paragraph" style:parent-style-name="Standard">
      <style:paragraph-properties fo:line-height="100%"/>
      <style:text-properties officeooo:paragraph-rsid="0016e062"/>
    </style:style>
    <style:style style:name="P5" style:family="paragraph" style:parent-style-name="Standard">
      <style:paragraph-properties fo:line-height="100%" fo:text-align="center" style:justify-single-word="false"/>
      <style:text-properties fo:font-size="18pt" fo:font-weight="bold" style:font-size-asian="18pt" style:font-weight-asian="bold"/>
    </style:style>
    <style:style style:name="P6" style:family="paragraph" style:parent-style-name="Standard">
      <style:paragraph-properties fo:line-height="100%"/>
      <style:text-properties fo:font-size="14pt" fo:font-weight="bold" style:font-size-asian="14pt" style:font-weight-asian="bold"/>
    </style:style>
    <style:style style:name="P7" style:family="paragraph" style:parent-style-name="Standard">
      <style:paragraph-properties fo:line-height="100%"/>
      <style:text-properties officeooo:rsid="0016e062" officeooo:paragraph-rsid="0016e062"/>
    </style:style>
    <style:style style:name="P8" style:family="paragraph" style:parent-style-name="Standard">
      <style:paragraph-properties fo:line-height="100%"/>
      <style:text-properties officeooo:paragraph-rsid="00185cf6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583bf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6e062" style:font-weight-asian="bold" style:font-weight-complex="bold"/>
    </style:style>
    <style:style style:name="T5" style:family="text">
      <style:text-properties fo:font-weight="bold" officeooo:rsid="00185cf6" style:font-weight-asian="bold" style:font-weight-complex="bold"/>
    </style:style>
    <style:style style:name="T6" style:family="text">
      <style:text-properties fo:font-weight="bold" officeooo:rsid="0016e062" style:font-weight-asian="bold"/>
    </style:style>
    <style:style style:name="T7" style:family="text">
      <style:text-properties fo:font-size="14pt" fo:font-weight="bold" style:font-size-asian="14pt" style:font-weight-asian="bold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officeooo:rsid="0016e062"/>
    </style:style>
    <style:style style:name="T11" style:family="text">
      <style:text-properties officeooo:rsid="00185c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DSON DE LIMA SOUZA</text:p>
      <text:p text:style-name="P1">Arcoverde – Pernambuco<text:line-break/>(87) 99636-7039 | edsonlimaagil@gmail.com<text:line-break/>LinkedIn: linkedin.com/in/edsonlimadev | GitHub: github.com/EdsonDevLima</text:p>
      <text:p text:style-name="P1"><text:span text:style-name="T1">NODE.JS | TYPESCRIPT | REACT | </text:span><text:span text:style-name="T2">C# |</text:span><text:span text:style-name="T1"> .NET | DOCKER | REDIS | </text:span><text:span text:style-name="T6">GIT</text:span><text:span text:style-name="T1"> </text:span></text:p>
      <text:p text:style-name="P6">Objetivo</text:p>
      <text:p text:style-name="P2">Desenvolvedor Full Stack com foco em Backend (.NET / Node.js), com experiência em integrações de sistemas, APIs REST e arquitetura de software.Perfil analítico, com vivência na investigação e resolução de problemas técnicos, documentação de processos e comunicação com equipes internas e clientes.</text:p>
      <text:p text:style-name="P6">Formação Acadêmica</text:p>
      <text:p text:style-name="P2">• Análise e Desenvolvimento de Sistemas — Unopar (Conclusão em 08/2024)</text:p>
      <text:p text:style-name="P6">Conhecimentos</text:p>
      <text:p text:style-name="P2"><text:span text:style-name="T3">Backend:</text:span> Node.js, TypeScript,C#/.NET, APIs REST, JWT, Redis, Microsserviços<text:line-break/><text:span text:style-name="T3">Frontend:</text:span> React.js, Next.js, Vue.js, Tailwind CSS<text:line-break/><text:span text:style-name="T3">Banco de Dados:</text:span> PostgreSQL, MySQL, SQL Server<text:line-break/><text:span text:style-name="T3">Infraestrutura &amp; DevOps:</text:span> Docker, Linux, Cloudflare, DigitalOcean, Render, GitHub, GitLab<text:line-break/><text:span text:style-name="T3">Arquitetura &amp; Engenharia:</text:span> DDD, Clean Code, Integrações de Sistemas, Automações, Filas e processamento assíncrono, Segurança de aplicações<text:line-break/><text:span text:style-name="T3">Ferramentas de IA: </text:span>ChatGPT, Codex, Claude, Cursor AI</text:p>
      <text:p text:style-name="P6">Experiência Profissional</text:p>
      <text:p text:style-name="P8"><text:span text:style-name="T3">Agil.net </text:span>- Desenvolvedor Full Stack - <text:span text:style-name="T3">Nov/2024 - Jun/2026 (1 ano e 7 meses)</text:span><text:line-break/>• Desenvolvimento backend.<text:line-break/>• Desenvolvimento frontend com Vue.js<text:line-break/>• Integrações entre CRMs e plataformas externas<text:line-break/>• Implementação de automações e rotinas de processamento<text:line-break/>• Utilização de Redis para cache e filas<text:line-break/>• Deploys em ambiente Linux e gerenciamento via Cloudflare<text:line-break/>• Aplicação de DDD, Clean Code e boas práticas de segurança<text:line-break/><text:line-break/><text:span text:style-name="T3">CTM</text:span> - Consultoria Softwares Públicos - Suporte Técnico - <text:span text:style-name="T3">Nov/2021 - Mai/2025 (3 anos)</text:span><text:span text:style-name="T5"> </text:span><text:span text:style-name="T3"><text:line-break/></text:span>• Atendimento e suporte técnico a usuários<text:line-break/>• Diagnóstico e resolução de problemas em sistemas<text:line-break/>• Apoio em infraestrutura e manutenção de aplicações</text:p>
      <text:p text:style-name="P6">Projetos</text:p>
      <text:p text:style-name="P4"><text:span text:style-name="T9">Atlas CRM</text:span> — Sistema de gerenciamento de vendas e relacionamento comercial.<text:line-break/>Tecnologias: React, NestJS, Node.js, TypeScript, MySQL, JWT<text:line-break/><text:span text:style-name="T8">Atlas Vendas </text:span>— Plataforma de vendas online integrada a fornecedores externos.<text:line-break/>Tecnologias: Next.js, TypeScript, Tailwind CSS, APIs externas<text:line-break/><text:span text:style-name="T3">System Saúde</text:span> — Sistema de automação de atendimento hospitalar.<text:line-break/>Tecnologias: C#, .NET, DDD, SQL Server<text:line-break/><text:span text:style-name="T3">S</text:span><text:span text:style-name="T4">istema de gerenciamento corporativo</text:span> — Sistema de automação de atendimento hospitalar.<text:line-break/>Tecnologias: C#, .NET, DDD, SQL Server, <text:span text:style-name="T10">Dapper, Repository patern, injeção de dependencias.</text:span></text:p>
      <text:p text:style-name="P7"><text:soft-page-break/></text:p>
      <text:p text:style-name="P3"/>
      <text:p text:style-name="P2"><text:span text:style-name="T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Arial" fo:font-family="Arial" style:font-family-generic="roman" style:font-pitch="variable" fo:font-size="11pt" style:font-name-asian="Arial1" style:font-family-asian="Arial" style:font-family-generic-asian="system" style:font-pitch-asian="variable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041cm" fo:margin-bottom="0.94cm" fo:margin-left="1.981cm" fo:margin-right="1.981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201cm" fo:margin-left="0cm" fo:margin-right="0cm" fo:margin-top="0.101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4</meta:editing-cycles>
    <meta:creation-date>2013-12-23T23:15:00</meta:creation-date>
    <dc:date>2026-06-19T16:00:48.925780262</dc:date>
    <meta:editing-duration>PT5H57M10S</meta:editing-duration>
    <meta:generator>LibreOffice/24.2.7.2$Linux_X86_64 LibreOffice_project/420$Build-2</meta:generator>
    <meta:print-date>2026-06-19T10:00:49.930425154</meta:print-date>
    <meta:printed-by>Arquivos PDF</meta:printed-by>
    <meta:document-statistic meta:table-count="0" meta:image-count="0" meta:object-count="0" meta:page-count="2" meta:paragraph-count="13" meta:word-count="317" meta:character-count="2305" meta:non-whitespace-character-count="1992"/>
    <meta:user-defined meta:name="AppVersion">14.0000</meta:user-defined>
    <meta:template xlink:type="simple" xlink:actuate="onRequest" xlink:title="Normal.dotm" xlink:href=""/>
  </office:meta>
</office:document-meta>
</file>